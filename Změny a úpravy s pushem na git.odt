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akže pokud chceš dál pracovat na portfoliu:</text:p>
      <text:list text:style-name="L1">
        <text:list-item>
          <text:p text:style-name="P1">Úpravy dělej ve VS Code. </text:p>
        </text:list-item>
        <text:list-item>
          <text:p text:style-name="P1">Návrhy změn, HTML, CSS, JavaScript a Git workflow můžeme řešit tady. </text:p>
        </text:list-item>
        <text:list-item>
          <text:p text:style-name="P2">Po změnách: </text:p>
        </text:list-item>
      </text:list>
      <text:section text:style-name="Sect1" text:name="code-block-viewer">
        <text:p text:style-name="P3"><text:span text:style-name="Source_20_Text">git add .</text:span></text:p>
        <text:p text:style-name="Preformatted_20_Text"><text:span text:style-name="Source_20_Text">git commit -m "update portfolio"</text:span></text:p>
        <text:p text:style-name="P4"><text:span text:style-name="Source_20_Text">git push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9T11:09:34.875206200</meta:creation-date>
    <dc:date>2026-06-09T11:09:43.058141800</dc:date>
    <meta:editing-duration>PT9S</meta:editing-duration>
    <meta:editing-cycles>1</meta:editing-cycles>
    <meta:generator>LibreOffice/26.2.1.2$Windows_X86_64 LibreOffice_project/620$Build-2</meta:generator>
    <meta:document-statistic meta:table-count="0" meta:image-count="0" meta:object-count="0" meta:page-count="1" meta:paragraph-count="7" meta:word-count="38" meta:character-count="205" meta:non-whitespace-character-count="174"/>
  </office:meta>
</office:document-meta>
</file>