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 fo:font-weight="normal" officeooo:paragraph-rsid="000829ef" style:font-weight-asian="normal" style:font-weight-complex="normal"/>
    </style:style>
    <style:style style:name="P2" style:family="paragraph" style:parent-style-name="Text_20_body">
      <style:text-properties officeooo:paragraph-rsid="00082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se Study – Brand Identity for an Asian Bistro</text:h>
      <text:h text:style-name="Heading_20_2" text:outline-level="2">Challenge</text:h>
      <text:p text:style-name="Text_20_body">The goal was to create a complete brand identity for a modern Asian bistro. The project included logo design, color palette, typography, and a cohesive visual system that could be applied across menus, business cards, notepads, and gift vouchers.</text:p>
      <text:h text:style-name="Heading_20_2" text:outline-level="2">Process</text:h>
      <text:p text:style-name="Text_20_body">I developed the visual direction around the bistro's signature dishes, particularly gyoza dumplings and noodle-based meals. Their colors and character influenced the overall palette, typography, and graphic elements. The objective was to create a recognizable identity that felt modern while subtly reflecting the restaurant's Asian roots.</text:p>
      <text:h text:style-name="Heading_20_2" text:outline-level="2">Solution</text:h>
      <text:p text:style-name="Text_20_body">The final identity focused on simplicity, clarity, and consistency. A unified visual language was applied across all printed materials, ensuring that every customer touchpoint communicated the same brand message while remaining practical for production and everyday use.</text:p>
      <text:h text:style-name="Heading_20_2" text:outline-level="2">Key Takeaway</text:h>
      <text:p text:style-name="Text_20_body">I learned that a strong brand is built through consistency rather than individual design elements. A logo alone does not create recognition, the entire visual system must work together to communicate the same message.</text:p>
      <text:p text:style-name="Text_20_body"/>
      <text:h text:style-name="P1" text:outline-level="3">Role</text:h>
      <text:p text:style-name="P2">Graphic Designer</text:p>
      <text:h text:style-name="P1" text:outline-level="3">Tools</text:h>
      <text:p text:style-name="P2">Adobe Illustrator, Adobe Photoshop, Adobe InDesign</text:p>
      <text:h text:style-name="P1" text:outline-level="3">Focus</text:h>
      <text:p text:style-name="P2">Brand Identity, Visual Communication, Print Desig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4:43:23.978098300</meta:creation-date>
    <dc:date>2026-06-10T14:44:58.995469300</dc:date>
    <meta:editing-duration>PT1M34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15" meta:word-count="186" meta:character-count="1285" meta:non-whitespace-character-count="1113"/>
  </office:meta>
</office:document-meta>
</file>