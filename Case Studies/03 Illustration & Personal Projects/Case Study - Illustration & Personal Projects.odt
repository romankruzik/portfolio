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0e98"/>
    </style:style>
    <style:style style:name="P2" style:family="paragraph" style:parent-style-name="Text_20_body">
      <style:text-properties officeooo:paragraph-rsid="000b0e98"/>
    </style:style>
    <style:style style:name="P3" style:family="paragraph" style:parent-style-name="Heading_20_3">
      <style:text-properties style:text-underline-style="solid" style:text-underline-width="auto" style:text-underline-color="font-color" fo:font-weight="normal" officeooo:paragraph-rsid="000b0e98" style:font-weight-asian="normal" style:font-weight-complex="normal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officeooo:rsid="000c9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se Study – Concept Art for a Game Project</text:h>
      <text:h text:style-name="Heading_20_2" text:outline-level="2">Challenge</text:h>
      <text:p text:style-name="Text_20_body">Design a wooden bridge for a snowy game environment, serving as a functional and atmospheric element within the scene.</text:p>
      <text:h text:style-name="Heading_20_2" text:outline-level="2">Process</text:h>
      <text:p text:style-name="Text_20_body">After gathering requirements for the bridge’s structure and role in the game world, I created quick sketches to align with the team on composition and intent. These annotated sketches were used by 3D artists and developers as a base for production. Once approved, I developed a final colored concept that defined lighting, materials, and atmosphere.</text:p>
      <text:h text:style-name="Heading_20_2" text:outline-level="2">Solution</text:h>
      <text:p text:style-name="Text_20_body">The final concept places the bridge naturally within a frozen landscape, emphasizing its role as a passage across a deep ravine. The contrast between warm wooden tones and the cold snowy environment enhances readability while reinforcing the atmosphere of a harsh winter world.</text:p>
      <text:h text:style-name="Heading_20_2" text:outline-level="2">Key Takeaway</text:h>
      <text:p text:style-name="Text_20_body">Even simple objects require full contextual thinking. Lighting, wear, materiality, and narrative purpose all influence how the asset feels and how it contributes to the overall world-building.</text:p>
      <text:p text:style-name="P1"><text:line-break/><text:span text:style-name="T1">Role</text:span></text:p>
      <text:p text:style-name="P2">Illustrator / Concept Artist</text:p>
      <text:h text:style-name="P3" text:outline-level="3">Tools</text:h>
      <text:p text:style-name="P2">Photoshop, <text:span text:style-name="T2">Affinity</text:span></text:p>
      <text:h text:style-name="P3" text:outline-level="3">Focus</text:h>
      <text:p text:style-name="P1">Concept Art, Environment Design, Visual Storytell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5:10:29.661834600</meta:creation-date>
    <dc:date>2026-06-10T15:11:39.913938700</dc:date>
    <meta:editing-duration>PT58S</meta:editing-duration>
    <meta:editing-cycles>3</meta:editing-cycles>
    <meta:generator>LibreOffice/26.2.1.2$Windows_X86_64 LibreOffice_project/620$Build-2</meta:generator>
    <meta:document-statistic meta:table-count="0" meta:image-count="0" meta:object-count="0" meta:page-count="1" meta:paragraph-count="15" meta:word-count="172" meta:character-count="1129" meta:non-whitespace-character-count="970"/>
  </office:meta>
</office:document-meta>
</file>