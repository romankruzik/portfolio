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text-properties officeooo:rsid="00037d34" officeooo:paragraph-rsid="00037d34"/>
    </style:style>
    <style:style style:name="P2" style:family="paragraph" style:parent-style-name="Heading_20_2">
      <style:text-properties officeooo:rsid="00037d34"/>
    </style:style>
    <style:style style:name="P3" style:family="paragraph" style:parent-style-name="Text_20_body">
      <style:text-properties officeooo:rsid="00037d34"/>
    </style:style>
    <style:style style:name="P4" style:family="paragraph" style:parent-style-name="Heading_20_2">
      <style:text-properties officeooo:rsid="00088669" officeooo:paragraph-rsid="00088669"/>
    </style:style>
    <style:style style:name="P5" style:family="paragraph" style:parent-style-name="Standard">
      <style:text-properties style:text-underline-style="solid" style:text-underline-width="auto" style:text-underline-color="font-color" officeooo:rsid="00037d34" officeooo:paragraph-rsid="00037d34"/>
    </style:style>
    <style:style style:name="P6" style:family="paragraph" style:parent-style-name="Standard">
      <style:text-properties officeooo:rsid="00037d34" officeooo:paragraph-rsid="00037d34"/>
    </style:style>
    <style:style style:name="T1" style:family="text">
      <style:text-properties fo:font-size="26pt" fo:font-weight="bold" style:font-size-asian="26pt" style:font-weight-asian="bold" style:font-size-complex="26pt" style:font-weight-complex="bold"/>
    </style:style>
    <style:style style:name="T2" style:family="text">
      <style:text-properties officeooo:rsid="0004b192"/>
    </style:style>
    <style:style style:name="T3" style:family="text">
      <style:text-properties officeooo:rsid="000727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se Study – Catalog Redesign for Dental Software</text:h>
      <text:h text:style-name="Heading_20_2" text:outline-level="2">01 Challenge</text:h>
      <text:h text:style-name="Heading_20_3" text:outline-level="3">What Wasn't Working</text:h>
      <text:p text:style-name="Text_20_body">My task was to take an outdated catalog concept and redesign it from the ground up.</text:p>
      <text:p text:style-name="Text_20_body">At the time, the catalog functioned mainly as a simple download window for 3D models used in dental workflows, such as implants, bridges, and other prosthetic components. While it served its basic purpose, it lacked structure, scalability, and room for future improvements.</text:p>
      <text:p text:style-name="Horizontal_20_Line"/>
      <text:h text:style-name="Heading_20_2" text:outline-level="2">02 My Approach</text:h>
      <text:h text:style-name="Heading_20_3" text:outline-level="3">What I Needed to Understand</text:h>
      <text:p text:style-name="Text_20_body">I started by gathering available data and analyzing how the catalog was being used. Based on these findings, I built a new information structure focused on clarity and long-term maintainability.</text:p>
      <text:p text:style-name="Text_20_body">Paper sketches helped me quickly explore ideas, identify unnecessary elements, and iterate on the overall concept. Once the structure was defined, I created wireframes to establish the layout and user flow.</text:p>
      <text:p text:style-name="Text_20_body">The next step was a fully interactive mockup that demonstrated the visual design and key functionality. After approval, I worked closely with the development team throughout implementation, testing, debugging, and the transition into production.</text:p>
      <text:p text:style-name="Horizontal_20_Line"/>
      <text:h text:style-name="Heading_20_2" text:outline-level="2">03 Solution</text:h>
      <text:h text:style-name="Heading_20_3" text:outline-level="3">From Concept to Result</text:h>
      <text:p text:style-name="Text_20_body">One of the key requirements was support for multiple catalog versions. This allowed users to continue working with older hardware and software configurations while still receiving the content they needed. Maintaining compatibility reduced the risk of workflow disruptions and helped retain users who might otherwise consider alternative solutions.</text:p>
      <text:p text:style-name="Text_20_body">The catalog structure was reorganized into clear categories, making navigation more intuitive. Additional improvements included package status indicators, download progress tracking, error notifications, and controls for pausing or managing downloads.</text:p>
      <text:p text:style-name="Horizontal_20_Line"/>
      <text:h text:style-name="Heading_20_2" text:outline-level="2"><text:soft-page-break/>04 Key Takeaway</text:h>
      <text:h text:style-name="Heading_20_3" text:outline-level="3">What I Learned</text:h>
      <text:p text:style-name="Text_20_body">This project taught me that giving users unlimited options is not always the best solution.</text:p>
      <text:p text:style-name="Text_20_body">At one point, it became necessary to explain that the catalog could not become "an application within an application." Trying to include every possible feature would have transformed a focused tool into an entirely new product.</text:p>
      <text:p text:style-name="Text_20_body">A good design is not about adding everything that is possible. It is about understanding what is necessary and keeping the solution focused on its purpose.</text:p>
      <text:p text:style-name="Standard"/>
      <text:p text:style-name="P1"><text:span text:style-name="T1">Zkrácená verze</text:span><text:line-break/><text:line-break/>Case Study – Catalog Redesign for Dental Software</text:p>
      <text:h text:style-name="P2" text:outline-level="2">Challenge</text:h>
      <text:p text:style-name="P3">The existing catalog served mainly as a simple download window for 3D dental models. It lacked structure, scalability, and support for different user environments, limiting its long-term usability.</text:p>
      <text:h text:style-name="P4" text:outline-level="2">Process</text:h>
      <text:p text:style-name="P3">I analyzed existing data, restructured the content architecture, and explored solutions through sketches and wireframes. After validating the concept, I created an interactive prototype and collaborated closely with developers during implementation and testing.</text:p>
      <text:h text:style-name="P2" text:outline-level="2">Solution</text:h>
      <text:p text:style-name="P3">The redesigned catalog introduced version management for compatibility with older systems, clearer categorization, and improved download management. Users gained better visibility into package status, progress, and error handling, resulting in a more reliable workflow.</text:p>
      <text:h text:style-name="P2" text:outline-level="2">Key Takeaway</text:h>
      <text:p text:style-name="P3">This project reinforced an important lesson: not every request should become a feature. Good design is often about defining clear boundaries and keeping a product focused on its core purpose.</text:p>
      <text:p text:style-name="P3"/>
      <text:p text:style-name="P3"/>
      <text:p text:style-name="P5">Role</text:p>
      <text:p text:style-name="P6">UX/UI Designer</text:p>
      <text:p text:style-name="P6"/>
      <text:p text:style-name="P5">Tools</text:p>
      <text:p text:style-name="P6">Figma, <text:span text:style-name="T2">Adobe, </text:span><text:span text:style-name="T3">AI</text:span></text:p>
      <text:p text:style-name="P6"/>
      <text:p text:style-name="P5">Focus</text:p>
      <text:p text:style-name="P6">Information Architecture, Workflow Design, Developer Hand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0T08:36:05.051844300</meta:creation-date>
    <dc:date>2026-06-10T08:41:20.403836400</dc:date>
    <meta:editing-duration>PT5M14S</meta:editing-duration>
    <meta:editing-cycles>6</meta:editing-cycles>
    <meta:generator>LibreOffice/26.2.1.2$Windows_X86_64 LibreOffice_project/620$Build-2</meta:generator>
    <meta:document-statistic meta:table-count="0" meta:image-count="0" meta:object-count="0" meta:page-count="3" meta:paragraph-count="34" meta:word-count="493" meta:character-count="3378" meta:non-whitespace-character-count="2916"/>
  </office:meta>
</office:document-meta>
</file>