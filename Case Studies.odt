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paragraph-properties fo:margin-top="0cm" fo:margin-bottom="0cm" style:contextual-spacing="false"/>
    </style:style>
    <style:style style:name="P2" style:family="paragraph" style:parent-style-name="Text_20_body" style:list-style-name="L1"/>
    <style:style style:name="P3" style:family="paragraph" style:parent-style-name="Text_20_body" style:list-style-name="L2">
      <style:paragraph-properties fo:margin-top="0cm" fo:margin-bottom="0cm" style:contextual-spacing="false"/>
    </style:style>
    <style:style style:name="P4" style:family="paragraph" style:parent-style-name="Text_20_body" style:list-style-name="L2"/>
    <style:style style:name="P5" style:family="paragraph" style:parent-style-name="Heading_20_1">
      <style:text-properties officeooo:rsid="0007346a" officeooo:paragraph-rsid="0007346a"/>
    </style:style>
    <style:style style:name="P6" style:family="paragraph" style:parent-style-name="Text_20_body">
      <style:text-properties officeooo:rsid="0007346a"/>
    </style:style>
    <style:style style:name="P7" style:family="paragraph" style:parent-style-name="Horizontal_20_Line">
      <style:paragraph-properties fo:margin-top="0cm" fo:margin-bottom="0.247cm" style:contextual-spacing="false" fo:line-height="115%"/>
      <style:text-properties officeooo:rsid="0007346a"/>
    </style:style>
    <style:style style:name="P8" style:family="paragraph" style:parent-style-name="Heading_20_3">
      <style:paragraph-properties fo:margin-top="0cm" fo:margin-bottom="0.247cm" style:contextual-spacing="false" fo:line-height="115%"/>
      <style:text-properties officeooo:rsid="0007346a"/>
    </style:style>
    <style:style style:name="P9" style:family="paragraph" style:parent-style-name="Heading_20_1">
      <style:paragraph-properties fo:margin-top="0cm" fo:margin-bottom="0.247cm" style:contextual-spacing="false" fo:line-height="115%"/>
      <style:text-properties officeooo:rsid="0007346a"/>
    </style:style>
    <style:style style:name="P10" style:family="paragraph" style:parent-style-name="Text_20_body">
      <style:text-properties officeooo:rsid="0007346a" officeooo:paragraph-rsid="0007346a"/>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01 Contact</text:h>
      <text:h text:style-name="Heading_20_3" text:outline-level="3">Aligning on goals</text:h>
      <text:p text:style-name="Text_20_body">Every project starts with a direct conversation with the product owner or client. I document key requirements in structured meeting notes and validate them immediately to ensure shared understanding of goals, constraints, and user needs.</text:p>
      <text:p text:style-name="Horizontal_20_Line"/>
      <text:h text:style-name="Heading_20_2" text:outline-level="2">02 Discovery</text:h>
      <text:h text:style-name="Heading_20_3" text:outline-level="3">Research &amp; direction</text:h>
      <text:p text:style-name="Text_20_body">I analyze existing solutions and interaction patterns to avoid unnecessary complexity. Early sketches help separate essential functionality from noise. This phase focuses on exploring multiple directions quickly rather than refining details.</text:p>
      <text:p text:style-name="Horizontal_20_Line"/>
      <text:h text:style-name="Heading_20_2" text:outline-level="2">03 Structure</text:h>
      <text:h text:style-name="Heading_20_3" text:outline-level="3">Wireframes &amp; architecture</text:h>
      <text:p text:style-name="Text_20_body">I translate research into structured wireframes defining layout, hierarchy, and system behavior.</text:p>
      <text:p text:style-name="Text_20_body">Key elements include:</text:p>
      <text:list text:style-name="L1">
        <text:list-item>
          <text:p text:style-name="P1">categories and catalog structure </text:p>
        </text:list-item>
        <text:list-item>
          <text:p text:style-name="P1">import and versioning system </text:p>
        </text:list-item>
        <text:list-item>
          <text:p text:style-name="P1">download states and status indicators </text:p>
        </text:list-item>
        <text:list-item>
          <text:p text:style-name="P2">pause/resume and system feedback </text:p>
        </text:list-item>
      </text:list>
      <text:p text:style-name="Text_20_body">Wireframes are validated early with stakeholders to avoid costly changes later.</text:p>
      <text:p text:style-name="Horizontal_20_Line"/>
      <text:h text:style-name="Heading_20_2" text:outline-level="2">04 Visual Design</text:h>
      <text:h text:style-name="Heading_20_3" text:outline-level="3">High-fidelity UI</text:h>
      <text:p text:style-name="Text_20_body">If no design system exists, I build visual direction through hi-fi mockups.</text:p>
      <text:p text:style-name="Text_20_body">This includes:</text:p>
      <text:list text:style-name="L2">
        <text:list-item>
          <text:p text:style-name="P3">typography and color system </text:p>
        </text:list-item>
        <text:list-item>
          <text:p text:style-name="P3">component styling </text:p>
        </text:list-item>
        <text:list-item>
          <text:p text:style-name="P4">system states (downloads, updates, notifications) </text:p>
        </text:list-item>
      </text:list>
      <text:p text:style-name="Text_20_body">The goal is to make the system visually clear and production-ready.</text:p>
      <text:p text:style-name="Horizontal_20_Line"/>
      <text:h text:style-name="Heading_20_2" text:outline-level="2"><text:soft-page-break/>05 Validation</text:h>
      <text:h text:style-name="Heading_20_3" text:outline-level="3">Prototype &amp; feedback</text:h>
      <text:p text:style-name="Text_20_body">I create interactive prototypes to test real user flows with stakeholders.</text:p>
      <text:p text:style-name="Text_20_body">Feedback is gathered continuously and translated into iterations until the product behaves as expected for both users and business needs.</text:p>
      <text:p text:style-name="Horizontal_20_Line"/>
      <text:h text:style-name="Heading_20_2" text:outline-level="2">06 Delivery</text:h>
      <text:h text:style-name="Heading_20_3" text:outline-level="3">Handoff to development</text:h>
      <text:p text:style-name="Text_20_body">Final design is structured for implementation with clean files and supporting documentation.</text:p>
      <text:p text:style-name="Text_20_body">I stay available during development to clarify interactions and support smooth implementation.</text:p>
      <text:p text:style-name="Standard"><text:line-break/></text:p>
      <text:h text:style-name="P5" text:outline-level="1">Outcome &amp; Impact (Evidence-based)</text:h>
      <text:p text:style-name="P6">The redesign of the catalog system resulted in measurable improvements in usability, clarity, and system accessibility across devices.</text:p>
      <text:p text:style-name="P7"/>
      <text:h text:style-name="P8" text:outline-level="3"><text:s/>Reduced cognitive load in navigation</text:h>
      <text:p text:style-name="P6">The navigation structure was simplified and reorganized, which significantly reduced user confusion when browsing the catalog. Users are now able to understand system hierarchy faster and locate relevant content with less effort and fewer misclicks.</text:p>
      <text:p text:style-name="P7"/>
      <text:h text:style-name="P8" text:outline-level="3"><text:s/>Improved package status clarity</text:h>
      <text:p text:style-name="P6">The system introduced clearer state visibility for packages (available, downloading, outdated, or paused). This reduced uncertainty during interaction and helped users immediately understand what action, if any, is required.</text:p>
      <text:p text:style-name="P7"/>
      <text:h text:style-name="P8" text:outline-level="3">More consistent cross-device experience</text:h>
      <text:p text:style-name="P6">Interaction patterns were standardized across different device types and system environments. This resulted in a more predictable and stable user experience, especially in mixed-device workflows.</text:p>
      <text:p text:style-name="P7"/>
      <text:h text:style-name="P8" text:outline-level="3">Faster content discoverability by manufacturer</text:h>
      <text:p text:style-name="P6">The improved categorization and filtering logic enabled users to locate packages by manufacturer significantly faster, reducing time spent searching and improving task completion efficiency.</text:p>
      <text:p text:style-name="P7"/>
      <text:h text:style-name="P8" text:outline-level="3"><text:soft-page-break/>Extended system compatibility for legacy devices</text:h>
      <text:p text:style-name="P6">The redesigned catalog architecture supports older and less capable devices without degrading performance, ensuring broader usability across the installed user base.</text:p>
      <text:h text:style-name="P5" text:outline-level="1"/>
      <text:h text:style-name="P5" text:outline-level="1"><text:s/>Before / After (Problem → Solution)</text:h>
      <text:h text:style-name="P8" text:outline-level="3">Navigation &amp; structure</text:h>
      <text:p text:style-name="P6"><text:span text:style-name="Strong_20_Emphasis">Before:</text:span><text:line-break/>Users struggled to understand the catalog hierarchy, which led to confusion when searching for specific packages and inconsistent navigation behavior.</text:p>
      <text:p text:style-name="P6"><text:span text:style-name="Strong_20_Emphasis">After:</text:span><text:line-break/>The catalog structure was simplified and reorganized into a clearer hierarchy, enabling users to navigate intuitively and locate relevant content with fewer steps.</text:p>
      <text:p text:style-name="P7"/>
      <text:h text:style-name="P8" text:outline-level="3">Package status clarity</text:h>
      <text:p text:style-name="P6"><text:span text:style-name="Strong_20_Emphasis">Before:</text:span><text:line-break/>Users lacked clear feedback about the state of their packages, often unsure whether content was up to date, downloading, or incomplete.</text:p>
      <text:p text:style-name="P6"><text:span text:style-name="Strong_20_Emphasis">After:</text:span><text:line-break/>A structured status system was introduced, clearly communicating package states and reducing uncertainty during interaction.</text:p>
      <text:p text:style-name="P7"/>
      <text:h text:style-name="P8" text:outline-level="3">Cross-device usage</text:h>
      <text:p text:style-name="P6"><text:span text:style-name="Strong_20_Emphasis">Before:</text:span><text:line-break/>Inconsistent behavior across different devices made it difficult for users to reliably work with the catalog in mixed environments.</text:p>
      <text:p text:style-name="P6"><text:span text:style-name="Strong_20_Emphasis">After:</text:span><text:line-break/>Interaction patterns were unified, ensuring consistent behavior and predictable user experience across devices.</text:p>
      <text:p text:style-name="P7"/>
      <text:h text:style-name="P9" text:outline-level="1">Design Decisions</text:h>
      <text:h text:style-name="P8" text:outline-level="3">Why structure-first approach</text:h>
      <text:p text:style-name="P6">I prioritized information architecture before visual design to ensure scalability and prevent costly restructuring later in development.</text:p>
      <text:p text:style-name="P7"/>
      <text:h text:style-name="P8" text:outline-level="3"><text:soft-page-break/>Why explicit system states</text:h>
      <text:p text:style-name="P6">I designed package states as visible, always-present feedback elements to reduce cognitive load and eliminate hidden system behavior.</text:p>
      <text:p text:style-name="P7"/>
      <text:h text:style-name="P8" text:outline-level="3">Why modular catalog design</text:h>
      <text:p text:style-name="P6">The catalog was structured as a modular system to support versioning, device differences, and future expansion without breaking existing flows.</text:p>
      <text:p text:style-name="P7"/>
      <text:h text:style-name="P8" text:outline-level="3">Why early validation</text:h>
      <text:p text:style-name="P6">Wireframes were validated with stakeholders before visual design to minimize late-stage changes and ensure alignment on functional requirements.</text:p>
      <text:p text:style-name="P7"/>
      <text:h text:style-name="P9" text:outline-level="1">Constraints</text:h>
      <text:h text:style-name="P8" text:outline-level="3">Legacy device support</text:h>
      <text:p text:style-name="P6">The system had to remain usable on older or less capable devices, which influenced performance-conscious design decisions and simplified interaction patterns.</text:p>
      <text:p text:style-name="P7"/>
      <text:h text:style-name="P8" text:outline-level="3">Multi-device environment</text:h>
      <text:p text:style-name="P6">Users operate across different device types, requiring consistent interaction logic rather than device-specific variations.</text:p>
      <text:p text:style-name="P7"/>
      <text:h text:style-name="P8" text:outline-level="3">Product owner dependency</text:h>
      <text:p text:style-name="P6">All functional decisions had to be aligned with the product owner early, requiring structured documentation and clear communication of intent.</text:p>
      <text:p text:style-name="P7"/>
      <text:h text:style-name="P8" text:outline-level="3">Versioning complexity</text:h>
      <text:p text:style-name="P6">The catalog needed to support multiple versions of packages simultaneously, which influenced both structure and navigation logic.</text:p>
      <text:p text:style-name="P1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cs" fo:country="CZ"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cs" fo:country="CZ"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6-09T15:05:14.385212400</meta:creation-date>
    <dc:date>2026-06-09T17:05:56.910925800</dc:date>
    <meta:editing-duration>PT1H40M55S</meta:editing-duration>
    <meta:editing-cycles>7</meta:editing-cycles>
    <meta:generator>LibreOffice/26.2.1.2$Windows_X86_64 LibreOffice_project/620$Build-2</meta:generator>
    <meta:document-statistic meta:table-count="0" meta:image-count="0" meta:object-count="0" meta:page-count="4" meta:paragraph-count="72" meta:word-count="720" meta:character-count="5332" meta:non-whitespace-character-count="4679"/>
  </office:meta>
</office:document-meta>
</file>